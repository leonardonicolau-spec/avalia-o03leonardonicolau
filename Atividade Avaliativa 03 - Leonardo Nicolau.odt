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2323CB592ED.png" manifest:media-type="image/png"/>
  <manifest:file-entry manifest:full-path="Pictures/100000010000051A000001F16F8121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officeooo:rsid="001d4966" officeooo:paragraph-rsid="001d4966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style:font-name="Arial1"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weight="bold" officeooo:rsid="001d4966" officeooo:paragraph-rsid="001d496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weight="bold" officeooo:rsid="001eb739" officeooo:paragraph-rsid="001eb73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weight="bold" officeooo:rsid="001f0d64" officeooo:paragraph-rsid="001f0d6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officeooo:rsid="001d4966" officeooo:paragraph-rsid="001d4966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officeooo:rsid="001eb739" officeooo:paragraph-rsid="001eb739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weight="normal" officeooo:rsid="001eb739" officeooo:paragraph-rsid="001eb73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size="12pt" fo:font-weight="bold" officeooo:rsid="001f0d64" officeooo:paragraph-rsid="001f0d64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size="12pt" fo:font-weight="bold" officeooo:rsid="001eb739" officeooo:paragraph-rsid="001eb739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Arial1" fo:font-size="12pt" fo:font-weight="normal" officeooo:rsid="001eb739" officeooo:paragraph-rsid="001eb73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fo:font-weight="bold" officeooo:rsid="001f0d64" officeooo:paragraph-rsid="001f0d6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normal" officeooo:rsid="001f0d64" officeooo:paragraph-rsid="001f0d6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rsid="001f0d64" officeooo:paragraph-rsid="001f0d64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officeooo:rsid="001d4966" officeooo:paragraph-rsid="001eb739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12" style:family="text">
      <style:text-properties officeooo:rsid="00228564"/>
    </style:style>
    <style:style style:name="T13" style:family="text">
      <style:text-properties officeooo:rsid="00234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TECNOLÓGICA FEDERAL DO PARANÁ</text:p>
      <text:p text:style-name="P3"/>
      <text:p text:style-name="P3"/>
      <text:p text:style-name="P3"/>
      <text:p text:style-name="P3"/>
      <text:p text:style-name="P4">LEONARDO NICOLAU SKOROBOHATE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TIVIDADE <text:span text:style-name="T12">AVALIATIVA 0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GUARAPUAVA</text:p>
      <text:p text:style-name="P4">2026</text:p>
      <text:p text:style-name="P4"/>
      <text:p text:style-name="P8"><text:soft-page-break/>Universidade Tecnologica Federal do Parana<text:tab/></text:p>
      <text:p text:style-name="P8">Curso de Sistemas para Internet</text:p>
      <text:p text:style-name="P8">Disciplina de Fundamentos de Sistemas Computacionais</text:p>
      <text:p text:style-name="P12">1º semestre de 2026</text:p>
      <text:p text:style-name="P8"><text:span text:style-name="T1"/></text:p>
      <text:p text:style-name="P11"><text:span text:style-name="T13">PRINTS:</text:span></text:p>
      <text:p text:style-name="P5"><draw:frame draw:style-name="fr1" draw:name="Image1" text:anchor-type="char" svg:x="-1.824cm" svg:y="0.725cm" svg:width="18.872cm" svg:height="7.179cm" draw:z-index="0"><draw:image xlink:href="Pictures/100000010000051A000001F16F8121B0.png" xlink:type="simple" xlink:show="embed" xlink:actuate="onLoad" draw:mime-type="image/png"/></draw:frame><text:span text:style-name="T2"/></text:p>
      <text:p text:style-name="P19"><draw:frame draw:style-name="fr1" draw:name="Image2" text:anchor-type="char" svg:x="-0.185cm" svg:y="8.244cm" svg:width="15.662cm" svg:height="13.54cm" draw:z-index="1"><draw:image xlink:href="Pictures/100000010000028A000002323CB592ED.png" xlink:type="simple" xlink:show="embed" xlink:actuate="onLoad" draw:mime-type="image/png"/></draw:frame><text:span text:style-name="T2"><text:s/></text:span></text:p>
      <text:p text:style-name="P19"><text:soft-page-break/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9:31:44.650946018</meta:creation-date>
    <meta:generator>LibreOffice/24.2.7.2$Linux_X86_64 LibreOffice_project/420$Build-2</meta:generator>
    <dc:date>2026-06-09T19:19:54.927777202</dc:date>
    <meta:editing-duration>PT13M17S</meta:editing-duration>
    <meta:editing-cycles>3</meta:editing-cycles>
    <meta:document-statistic meta:table-count="0" meta:image-count="2" meta:object-count="0" meta:page-count="3" meta:paragraph-count="11" meta:word-count="34" meta:character-count="261" meta:non-whitespace-character-count="235"/>
  </office:meta>
</office:document-meta>
</file>